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9000001C354EB321F.png" manifest:media-type="image/png"/>
  <manifest:file-entry manifest:full-path="Pictures/100000010000024F00000123980DFF44.png" manifest:media-type="image/png"/>
  <manifest:file-entry manifest:full-path="Pictures/1000000100000287000001F248EC4B53.png" manifest:media-type="image/png"/>
  <manifest:file-entry manifest:full-path="Pictures/1000000100000232000000477969C990.png" manifest:media-type="image/png"/>
  <manifest:file-entry manifest:full-path="Pictures/10000001000002A9000000316865122E.png" manifest:media-type="image/png"/>
  <manifest:file-entry manifest:full-path="Pictures/10000001000002480000012F32C3CC1B.png" manifest:media-type="image/png"/>
  <manifest:file-entry manifest:full-path="Pictures/10000001000002A4000000309AFA74C9.png" manifest:media-type="image/png"/>
  <manifest:file-entry manifest:full-path="Pictures/100000010000024B000000A7E3978625.png" manifest:media-type="image/png"/>
  <manifest:file-entry manifest:full-path="Pictures/1000000100000247000000C6A8845FD6.png" manifest:media-type="image/png"/>
  <manifest:file-entry manifest:full-path="Pictures/10000001000001E100000082CF12DBDB.png" manifest:media-type="image/png"/>
  <manifest:file-entry manifest:full-path="Pictures/100000010000023B000001D4DEE8EBB9.png" manifest:media-type="image/png"/>
  <manifest:file-entry manifest:full-path="Pictures/10000001000002C7000001DE78C976C5.png" manifest:media-type="image/png"/>
  <manifest:file-entry manifest:full-path="Pictures/10000001000001FE000001684AA914D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Table2" style:family="table">
      <style:table-properties style:width="15.875cm" fo:margin-left="0.009cm" fo:margin-top="0cm" fo:margin-bottom="0cm" table:align="left" style:writing-mode="page"/>
    </style:style>
    <style:style style:name="Table2.A" style:family="table-column">
      <style:table-column-properties style:column-width="1.235cm"/>
    </style:style>
    <style:style style:name="Table2.B" style:family="table-column">
      <style:table-column-properties style:column-width="1.965cm"/>
    </style:style>
    <style:style style:name="Table2.C" style:family="table-column">
      <style:table-column-properties style:column-width="3.39cm"/>
    </style:style>
    <style:style style:name="Table2.D" style:family="table-column">
      <style:table-column-properties style:column-width="5.405cm"/>
    </style:style>
    <style:style style:name="Table2.E" style:family="table-column">
      <style:table-column-properties style:column-width="3.88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2.A2" style:family="table-cell">
      <style:table-cell-properties fo:padding-left="0.191cm" fo:padding-right="0.191cm" fo:padding-top="0cm" fo:padding-bottom="0cm" fo:border="0.5pt solid #000000"/>
    </style:style>
    <style:style style:name="Table2.B2" style:family="table-cell">
      <style:table-cell-properties fo:padding-left="0.191cm" fo:padding-right="0.191cm" fo:padding-top="0cm" fo:padding-bottom="0cm" fo:border="0.5pt solid #000000"/>
    </style:style>
    <style:style style:name="Table2.C2" style:family="table-cell">
      <style:table-cell-properties fo:padding-left="0.191cm" fo:padding-right="0.191cm" fo:padding-top="0cm" fo:padding-bottom="0cm" fo:border="0.5pt solid #000000"/>
    </style:style>
    <style:style style:name="Table2.D2" style:family="table-cell">
      <style:table-cell-properties fo:padding-left="0.191cm" fo:padding-right="0.191cm" fo:padding-top="0cm" fo:padding-bottom="0cm" fo:border="0.5pt solid #000000"/>
    </style:style>
    <style:style style:name="Table2.E2" style:family="table-cell">
      <style:table-cell-properties fo:padding-left="0.191cm" fo:padding-right="0.191cm" fo:padding-top="0cm" fo:padding-bottom="0cm" fo:border="0.5pt solid #000000"/>
    </style:style>
    <style:style style:name="Table2.A3" style:family="table-cell">
      <style:table-cell-properties fo:padding-left="0.191cm" fo:padding-right="0.191cm" fo:padding-top="0cm" fo:padding-bottom="0cm" fo:border="0.5pt solid #000000"/>
    </style:style>
    <style:style style:name="Table2.B3" style:family="table-cell">
      <style:table-cell-properties fo:padding-left="0.191cm" fo:padding-right="0.191cm" fo:padding-top="0cm" fo:padding-bottom="0cm" fo:border="0.5pt solid #000000"/>
    </style:style>
    <style:style style:name="Table2.C3" style:family="table-cell">
      <style:table-cell-properties fo:padding-left="0.191cm" fo:padding-right="0.191cm" fo:padding-top="0cm" fo:padding-bottom="0cm" fo:border="0.5pt solid #000000"/>
    </style:style>
    <style:style style:name="Table2.D3" style:family="table-cell">
      <style:table-cell-properties fo:padding-left="0.191cm" fo:padding-right="0.191cm" fo:padding-top="0cm" fo:padding-bottom="0cm" fo:border="0.5pt solid #000000"/>
    </style:style>
    <style:style style:name="Table2.E3" style:family="table-cell">
      <style:table-cell-properties fo:padding-left="0.191cm" fo:padding-right="0.191cm" fo:padding-top="0cm" fo:padding-bottom="0cm" fo:border="0.5pt solid #000000"/>
    </style:style>
    <style:style style:name="Table2.A4" style:family="table-cell">
      <style:table-cell-properties fo:padding-left="0.191cm" fo:padding-right="0.191cm" fo:padding-top="0cm" fo:padding-bottom="0cm" fo:border="0.5pt solid #000000"/>
    </style:style>
    <style:style style:name="Table2.B4" style:family="table-cell">
      <style:table-cell-properties fo:padding-left="0.191cm" fo:padding-right="0.191cm" fo:padding-top="0cm" fo:padding-bottom="0cm" fo:border="0.5pt solid #000000"/>
    </style:style>
    <style:style style:name="Table2.C4" style:family="table-cell">
      <style:table-cell-properties fo:padding-left="0.191cm" fo:padding-right="0.191cm" fo:padding-top="0cm" fo:padding-bottom="0cm" fo:border="0.5pt solid #000000"/>
    </style:style>
    <style:style style:name="Table2.D4" style:family="table-cell">
      <style:table-cell-properties fo:padding-left="0.191cm" fo:padding-right="0.191cm" fo:padding-top="0cm" fo:padding-bottom="0cm" fo:border="0.5pt solid #000000"/>
    </style:style>
    <style:style style:name="Table2.E4" style:family="table-cell">
      <style:table-cell-properties fo:padding-left="0.191cm" fo:padding-right="0.191cm" fo:padding-top="0cm" fo:padding-bottom="0cm" fo:border="0.5pt solid #000000"/>
    </style:style>
    <style:style style:name="Table2.A5" style:family="table-cell">
      <style:table-cell-properties fo:padding-left="0.191cm" fo:padding-right="0.191cm" fo:padding-top="0cm" fo:padding-bottom="0cm" fo:border="0.5pt solid #000000"/>
    </style:style>
    <style:style style:name="Table2.B5" style:family="table-cell">
      <style:table-cell-properties fo:padding-left="0.191cm" fo:padding-right="0.191cm" fo:padding-top="0cm" fo:padding-bottom="0cm" fo:border="0.5pt solid #000000"/>
    </style:style>
    <style:style style:name="Table2.C5" style:family="table-cell">
      <style:table-cell-properties fo:padding-left="0.191cm" fo:padding-right="0.191cm" fo:padding-top="0cm" fo:padding-bottom="0cm" fo:border="0.5pt solid #000000"/>
    </style:style>
    <style:style style:name="Table2.D5" style:family="table-cell">
      <style:table-cell-properties fo:padding-left="0.191cm" fo:padding-right="0.191cm" fo:padding-top="0cm" fo:padding-bottom="0cm" fo:border="0.5pt solid #000000"/>
    </style:style>
    <style:style style:name="Table2.E5" style:family="table-cell">
      <style:table-cell-properties fo:padding-left="0.191cm" fo:padding-right="0.191cm" fo:padding-top="0cm" fo:padding-bottom="0cm" fo:border="0.5pt solid #000000"/>
    </style:style>
    <style:style style:name="Table2.A6" style:family="table-cell">
      <style:table-cell-properties fo:padding-left="0.191cm" fo:padding-right="0.191cm" fo:padding-top="0cm" fo:padding-bottom="0cm" fo:border="0.5pt solid #000000"/>
    </style:style>
    <style:style style:name="Table2.B6" style:family="table-cell">
      <style:table-cell-properties fo:padding-left="0.191cm" fo:padding-right="0.191cm" fo:padding-top="0cm" fo:padding-bottom="0cm" fo:border="0.5pt solid #000000"/>
    </style:style>
    <style:style style:name="Table2.C6" style:family="table-cell">
      <style:table-cell-properties fo:padding-left="0.191cm" fo:padding-right="0.191cm" fo:padding-top="0cm" fo:padding-bottom="0cm" fo:border="0.5pt solid #000000"/>
    </style:style>
    <style:style style:name="Table2.D6" style:family="table-cell">
      <style:table-cell-properties fo:padding-left="0.191cm" fo:padding-right="0.191cm" fo:padding-top="0cm" fo:padding-bottom="0cm" fo:border="0.5pt solid #000000"/>
    </style:style>
    <style:style style:name="Table2.E6" style:family="table-cell">
      <style:table-cell-properties fo:padding-left="0.191cm" fo:padding-right="0.191cm" fo:padding-top="0cm" fo:padding-bottom="0cm" fo:border="0.5pt solid #000000"/>
    </style:style>
    <style:style style:name="Table2.A7" style:family="table-cell">
      <style:table-cell-properties fo:padding-left="0.191cm" fo:padding-right="0.191cm" fo:padding-top="0cm" fo:padding-bottom="0cm" fo:border="0.5pt solid #000000"/>
    </style:style>
    <style:style style:name="Table2.B7" style:family="table-cell">
      <style:table-cell-properties fo:padding-left="0.191cm" fo:padding-right="0.191cm" fo:padding-top="0cm" fo:padding-bottom="0cm" fo:border="0.5pt solid #000000"/>
    </style:style>
    <style:style style:name="Table2.C7" style:family="table-cell">
      <style:table-cell-properties fo:padding-left="0.191cm" fo:padding-right="0.191cm" fo:padding-top="0cm" fo:padding-bottom="0cm" fo:border="0.5pt solid #000000"/>
    </style:style>
    <style:style style:name="Table2.D7" style:family="table-cell">
      <style:table-cell-properties fo:padding-left="0.191cm" fo:padding-right="0.191cm" fo:padding-top="0cm" fo:padding-bottom="0cm" fo:border="0.5pt solid #000000"/>
    </style:style>
    <style:style style:name="Table2.E7" style:family="table-cell">
      <style:table-cell-properties fo:padding-left="0.191cm" fo:padding-right="0.191cm" fo:padding-top="0cm" fo:padding-bottom="0cm" fo:border="0.5pt solid #000000"/>
    </style:style>
    <style:style style:name="Table2.A8" style:family="table-cell">
      <style:table-cell-properties fo:padding-left="0.191cm" fo:padding-right="0.191cm" fo:padding-top="0cm" fo:padding-bottom="0cm" fo:border="0.5pt solid #000000"/>
    </style:style>
    <style:style style:name="Table2.B8" style:family="table-cell">
      <style:table-cell-properties fo:padding-left="0.191cm" fo:padding-right="0.191cm" fo:padding-top="0cm" fo:padding-bottom="0cm" fo:border="0.5pt solid #000000"/>
    </style:style>
    <style:style style:name="Table2.C8" style:family="table-cell">
      <style:table-cell-properties fo:padding-left="0.191cm" fo:padding-right="0.191cm" fo:padding-top="0cm" fo:padding-bottom="0cm" fo:border="0.5pt solid #000000"/>
    </style:style>
    <style:style style:name="Table2.D8" style:family="table-cell">
      <style:table-cell-properties fo:padding-left="0.191cm" fo:padding-right="0.191cm" fo:padding-top="0cm" fo:padding-bottom="0cm" fo:border="0.5pt solid #000000"/>
    </style:style>
    <style:style style:name="Table2.E8" style:family="table-cell">
      <style:table-cell-properties fo:padding-left="0.191cm" fo:padding-right="0.191cm" fo:padding-top="0cm" fo:padding-bottom="0cm" fo:border="0.5pt solid #000000"/>
    </style:style>
    <style:style style:name="Table2.A9" style:family="table-cell">
      <style:table-cell-properties fo:padding-left="0.191cm" fo:padding-right="0.191cm" fo:padding-top="0cm" fo:padding-bottom="0cm" fo:border="0.5pt solid #000000"/>
    </style:style>
    <style:style style:name="Table2.B9" style:family="table-cell">
      <style:table-cell-properties fo:padding-left="0.191cm" fo:padding-right="0.191cm" fo:padding-top="0cm" fo:padding-bottom="0cm" fo:border="0.5pt solid #000000"/>
    </style:style>
    <style:style style:name="Table2.C9" style:family="table-cell">
      <style:table-cell-properties fo:padding-left="0.191cm" fo:padding-right="0.191cm" fo:padding-top="0cm" fo:padding-bottom="0cm" fo:border="0.5pt solid #000000"/>
    </style:style>
    <style:style style:name="Table2.D9" style:family="table-cell">
      <style:table-cell-properties fo:padding-left="0.191cm" fo:padding-right="0.191cm" fo:padding-top="0cm" fo:padding-bottom="0cm" fo:border="0.5pt solid #000000"/>
    </style:style>
    <style:style style:name="Table2.E9" style:family="table-cell">
      <style:table-cell-properties fo:padding-left="0.191cm" fo:padding-right="0.191cm" fo:padding-top="0cm" fo:padding-bottom="0cm" fo:border="0.5pt solid #000000"/>
    </style:style>
    <style:style style:name="Table2.A10" style:family="table-cell">
      <style:table-cell-properties fo:padding-left="0.191cm" fo:padding-right="0.191cm" fo:padding-top="0cm" fo:padding-bottom="0cm" fo:border="0.5pt solid #000000"/>
    </style:style>
    <style:style style:name="Table2.B10" style:family="table-cell">
      <style:table-cell-properties fo:padding-left="0.191cm" fo:padding-right="0.191cm" fo:padding-top="0cm" fo:padding-bottom="0cm" fo:border="0.5pt solid #000000"/>
    </style:style>
    <style:style style:name="Table2.C10" style:family="table-cell">
      <style:table-cell-properties fo:padding-left="0.191cm" fo:padding-right="0.191cm" fo:padding-top="0cm" fo:padding-bottom="0cm" fo:border="0.5pt solid #000000"/>
    </style:style>
    <style:style style:name="Table2.D10" style:family="table-cell">
      <style:table-cell-properties fo:padding-left="0.191cm" fo:padding-right="0.191cm" fo:padding-top="0cm" fo:padding-bottom="0cm" fo:border="0.5pt solid #000000"/>
    </style:style>
    <style:style style:name="Table2.E10" style:family="table-cell">
      <style:table-cell-properties fo:padding-left="0.191cm" fo:padding-right="0.191cm" fo:padding-top="0cm" fo:padding-bottom="0cm" fo:border="0.5pt solid #000000"/>
    </style:style>
    <style:style style:name="Table2.A11" style:family="table-cell">
      <style:table-cell-properties fo:padding-left="0.191cm" fo:padding-right="0.191cm" fo:padding-top="0cm" fo:padding-bottom="0cm" fo:border="0.5pt solid #000000"/>
    </style:style>
    <style:style style:name="Table2.B11" style:family="table-cell">
      <style:table-cell-properties fo:padding-left="0.191cm" fo:padding-right="0.191cm" fo:padding-top="0cm" fo:padding-bottom="0cm" fo:border="0.5pt solid #000000"/>
    </style:style>
    <style:style style:name="Table2.C11" style:family="table-cell">
      <style:table-cell-properties fo:padding-left="0.191cm" fo:padding-right="0.191cm" fo:padding-top="0cm" fo:padding-bottom="0cm" fo:border="0.5pt solid #000000"/>
    </style:style>
    <style:style style:name="Table2.D11" style:family="table-cell">
      <style:table-cell-properties fo:padding-left="0.191cm" fo:padding-right="0.191cm" fo:padding-top="0cm" fo:padding-bottom="0cm" fo:border="0.5pt solid #000000"/>
    </style:style>
    <style:style style:name="Table2.E1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.141cm" style:contextual-spacing="false"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top="0cm" fo:margin-bottom="0.106cm" style:contextual-spacing="false" fo:line-height="150%" fo:text-align="justify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margin-top="0cm" fo:margin-bottom="0.706cm" style:contextual-spacing="false" fo:line-height="150%" fo:text-align="justify" style:justify-single-word="false"/>
      <style:text-properties style:font-name="Arial" fo:font-size="12pt" officeooo:paragraph-rsid="0009544f" style:font-size-asian="12pt" style:font-size-complex="12pt"/>
    </style:style>
    <style:style style:name="P4" style:family="paragraph" style:parent-style-name="Heading_20_1">
      <style:paragraph-properties fo:margin-top="0.423cm" fo:margin-bottom="0.212cm" style:contextual-spacing="false" fo:line-height="150%" fo:text-align="justify" style:justify-single-word="false"/>
      <style:text-properties style:font-name="Arial" fo:font-size="16pt" officeooo:paragraph-rsid="0009544f" style:font-size-asian="16pt" style:font-size-complex="16pt"/>
    </style:style>
    <style:style style:name="P5" style:family="paragraph" style:parent-style-name="Standard">
      <style:paragraph-properties fo:margin-top="0cm" fo:margin-bottom="0.282cm" style:contextual-spacing="false" fo:line-height="150%" fo:text-align="justify" style:justify-single-word="false"/>
      <style:text-properties style:font-name="Arial" fo:font-size="12pt" officeooo:paragraph-rsid="000d9bc0" style:font-size-asian="12pt" style:font-size-complex="12pt"/>
    </style:style>
    <style:style style:name="P6" style:family="paragraph" style:parent-style-name="Heading_20_1">
      <style:paragraph-properties fo:margin-top="0.423cm" fo:margin-bottom="0.212cm" style:contextual-spacing="false" fo:line-height="150%" fo:text-align="justify" style:justify-single-word="false"/>
      <style:text-properties style:font-name="Arial" fo:font-size="14pt" style:font-size-asian="14pt" style:font-size-complex="14pt"/>
    </style:style>
    <style:style style:name="P7" style:family="paragraph" style:parent-style-name="Heading_20_2">
      <style:paragraph-properties fo:margin-top="0.423cm" fo:margin-bottom="0.212cm" style:contextual-spacing="false" fo:line-height="150%" fo:text-align="justify" style:justify-single-word="false"/>
      <style:text-properties style:font-name="Arial" fo:font-size="14pt" style:font-size-asian="14pt" style:font-size-complex="14pt"/>
    </style:style>
    <style:style style:name="P8" style:family="paragraph" style:parent-style-name="Text_20_body">
      <style:paragraph-properties fo:margin-top="0cm" fo:margin-bottom="0.282cm" style:contextual-spacing="false" fo:line-height="150%" fo:text-align="justify" style:justify-single-word="false"/>
      <style:text-properties style:font-name="Times New Roman" fo:font-size="12pt" officeooo:paragraph-rsid="00100330" style:font-size-asian="12pt" style:font-size-complex="12pt"/>
    </style:style>
    <style:style style:name="P9" style:family="paragraph" style:parent-style-name="Heading_20_2">
      <style:paragraph-properties fo:line-height="150%"/>
      <style:text-properties style:font-name="Arial" fo:font-size="14pt" style:font-size-asian="14pt" style:font-size-complex="14pt"/>
    </style:style>
    <style:style style:name="P10" style:family="paragraph" style:parent-style-name="Text_20_body">
      <style:paragraph-properties fo:margin-top="0cm" fo:margin-bottom="0.282cm" style:contextual-spacing="false" fo:line-height="150%" fo:text-align="justify" style:justify-single-word="false"/>
      <style:text-properties style:font-name="Arial" fo:font-size="12pt" officeooo:paragraph-rsid="005a5e9a" style:font-size-asian="12pt" style:font-size-complex="12pt"/>
    </style:style>
    <style:style style:name="P11" style:family="paragraph" style:parent-style-name="Standard">
      <style:paragraph-properties fo:margin-top="0cm" fo:margin-bottom="0.282cm" style:contextual-spacing="false" fo:line-height="150%" fo:text-align="justify" style:justify-single-word="false"/>
      <style:text-properties style:font-name="Times New Roman" fo:font-size="12pt" officeooo:paragraph-rsid="001916ba" style:font-size-asian="12pt" style:font-size-complex="12pt"/>
    </style:style>
    <style:style style:name="P12" style:family="paragraph" style:parent-style-name="Heading_20_1">
      <style:paragraph-properties fo:line-height="150%"/>
      <style:text-properties style:font-name="Arial"/>
    </style:style>
    <style:style style:name="P13" style:family="paragraph" style:parent-style-name="Standard">
      <style:paragraph-properties fo:margin-top="0cm" fo:margin-bottom="0.282cm" style:contextual-spacing="false" fo:line-height="150%" fo:text-align="justify" style:justify-single-word="false"/>
      <style:text-properties style:font-name="Arial" fo:font-size="12pt" style:font-size-asian="12pt" style:font-size-complex="12pt"/>
    </style:style>
    <style:style style:name="P14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/>
      <style:text-properties style:font-name="Arial" fo:font-size="12pt" style:font-size-asian="12pt" style:font-size-complex="12pt"/>
    </style:style>
    <style:style style:name="P15" style:family="paragraph" style:parent-style-name="Text_20_body" style:list-style-name="L1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16" style:family="paragraph" style:parent-style-name="Text_20_body">
      <style:paragraph-properties fo:margin-top="0cm" fo:margin-bottom="0.282cm" style:contextual-spacing="false" fo:line-height="150%" fo:text-align="justify" style:justify-single-word="false"/>
      <style:text-properties style:font-name="Arial" fo:font-size="12pt" style:font-size-asian="12pt" style:font-size-complex="12pt"/>
    </style:style>
    <style:style style:name="P17" style:family="paragraph" style:parent-style-name="Heading_20_2">
      <style:paragraph-properties fo:line-height="150%" fo:break-before="page"/>
      <style:text-properties style:font-name="Arial" fo:font-size="14pt" style:font-size-asian="14pt" style:font-size-complex="14pt"/>
    </style:style>
    <style:style style:name="P18" style:family="paragraph" style:parent-style-name="Standard">
      <style:paragraph-properties fo:margin-top="0cm" fo:margin-bottom="0.282cm" style:contextual-spacing="false" fo:line-height="150%" fo:text-align="center" style:justify-single-word="false"/>
      <style:text-properties style:font-name="Arial" fo:font-size="12pt" officeooo:paragraph-rsid="0025f15d" style:font-size-asian="12pt" style:font-size-complex="12pt"/>
    </style:style>
    <style:style style:name="P19" style:family="paragraph" style:parent-style-name="Standard">
      <style:paragraph-properties fo:margin-top="0cm" fo:margin-bottom="0.282cm" style:contextual-spacing="false" fo:line-height="150%" fo:text-align="justify" style:justify-single-word="false"/>
      <style:text-properties style:font-name="Arial" fo:font-size="12pt" officeooo:paragraph-rsid="0025f15d" style:font-size-asian="12pt" style:font-size-complex="12pt"/>
    </style:style>
    <style:style style:name="P20" style:family="paragraph" style:parent-style-name="Heading_20_2">
      <style:paragraph-properties fo:margin-top="0.423cm" fo:margin-bottom="0.212cm" style:contextual-spacing="false" fo:line-height="150%" fo:text-align="justify" style:justify-single-word="false"/>
      <style:text-properties style:font-name="Arial" fo:font-size="14pt" officeooo:paragraph-rsid="004d789a" style:font-size-asian="14pt" style:font-size-complex="14pt"/>
    </style:style>
    <style:style style:name="P21" style:family="paragraph" style:parent-style-name="Heading_20_2">
      <style:paragraph-properties fo:margin-top="0.423cm" fo:margin-bottom="0.212cm" style:contextual-spacing="false" fo:line-height="150%" fo:text-align="justify" style:justify-single-word="false"/>
      <style:text-properties style:font-name="Arial" fo:font-size="14pt" officeooo:rsid="004d789a" officeooo:paragraph-rsid="004d789a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Arial" officeooo:rsid="004d789a" officeooo:paragraph-rsid="004d789a"/>
    </style:style>
    <style:style style:name="P23" style:family="paragraph" style:parent-style-name="Heading_20_1">
      <style:paragraph-properties fo:line-height="150%" fo:break-before="page"/>
      <style:text-properties style:font-name="Ari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7" style:family="paragraph" style:parent-style-name="Heading_20_1">
      <style:paragraph-properties fo:margin-top="0.423cm" fo:margin-bottom="0.212cm" style:contextual-spacing="false" fo:line-height="150%" fo:text-align="justify" style:justify-single-word="false"/>
      <style:text-properties style:font-name="Arial" fo:font-size="12pt" style:font-size-asian="12pt" style:font-size-complex="12pt"/>
    </style:style>
    <style:style style:name="P28" style:family="paragraph" style:parent-style-name="Heading_20_2">
      <style:text-properties style:font-name="Arial"/>
    </style:style>
    <style:style style:name="P29" style:family="paragraph" style:parent-style-name="Standard">
      <style:paragraph-properties fo:text-align="center" style:justify-single-word="false"/>
      <style:text-properties style:font-name="Arial" officeooo:rsid="004d789a" officeooo:paragraph-rsid="00500831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2pt" officeooo:rsid="004d789a" officeooo:paragraph-rsid="00500831" style:font-size-asian="12pt" style:font-size-complex="12pt"/>
    </style:style>
    <style:style style:name="P31" style:family="paragraph" style:parent-style-name="Heading_20_2">
      <style:text-properties style:font-name="Arial" officeooo:paragraph-rsid="00477141"/>
    </style:style>
    <style:style style:name="P32" style:family="paragraph" style:parent-style-name="Standard">
      <style:paragraph-properties fo:text-align="center" style:justify-single-word="false"/>
      <style:text-properties style:font-name="Arial" officeooo:paragraph-rsid="005235c8"/>
    </style:style>
    <style:style style:name="P33" style:family="paragraph" style:parent-style-name="Standard">
      <style:paragraph-properties fo:text-align="center" style:justify-single-word="false"/>
      <style:text-properties style:font-name="Arial" officeooo:rsid="004d789a" officeooo:paragraph-rsid="005235c8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" officeooo:paragraph-rsid="0056b9f9"/>
    </style:style>
    <style:style style:name="P35" style:family="paragraph" style:parent-style-name="Standard">
      <style:paragraph-properties fo:line-height="150%" fo:text-align="center" style:justify-single-word="false"/>
      <style:text-properties style:font-name="Arial" officeooo:rsid="004d789a" officeooo:paragraph-rsid="005a9008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" fo:font-size="12pt" officeooo:rsid="004d789a" officeooo:paragraph-rsid="005a9008" style:font-size-asian="12pt" style:font-size-complex="12pt"/>
    </style:style>
    <style:style style:name="P37" style:family="paragraph" style:parent-style-name="Standard">
      <style:paragraph-properties fo:line-height="150%" fo:text-align="justify" style:justify-single-word="false"/>
      <style:text-properties officeooo:paragraph-rsid="005c4c24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2pt" officeooo:rsid="004d789a" officeooo:paragraph-rsid="005c4c24" style:font-size-asian="12pt" style:font-size-complex="12pt"/>
    </style:style>
    <style:style style:name="P39" style:family="paragraph" style:parent-style-name="Standard">
      <style:paragraph-properties fo:line-height="150%" fo:text-align="center" style:justify-single-word="false"/>
      <style:text-properties style:font-name="Arial" officeooo:rsid="004d789a" officeooo:paragraph-rsid="00628493"/>
    </style:style>
    <style:style style:name="P40" style:family="paragraph" style:parent-style-name="Standard">
      <style:paragraph-properties fo:line-height="150%" fo:text-align="center" style:justify-single-word="false"/>
      <style:text-properties style:font-name="Arial" officeooo:rsid="004d789a" officeooo:paragraph-rsid="00622106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" officeooo:rsid="004d789a" officeooo:paragraph-rsid="00622106"/>
    </style:style>
    <style:style style:name="P42" style:family="paragraph" style:parent-style-name="Heading_20_2">
      <style:text-properties style:font-name="Arial" fo:font-size="12pt" officeooo:paragraph-rsid="00477141" style:font-size-asian="12pt" style:font-size-complex="12pt"/>
    </style:style>
    <style:style style:name="P43" style:family="paragraph" style:parent-style-name="Standard">
      <style:paragraph-properties fo:line-height="150%" fo:text-align="center" style:justify-single-word="false"/>
      <style:text-properties style:font-name="Arial" officeooo:rsid="004d789a" officeooo:paragraph-rsid="006444d7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Arial" officeooo:rsid="004d789a" officeooo:paragraph-rsid="006444d7"/>
    </style:style>
    <style:style style:name="P45" style:family="paragraph" style:parent-style-name="Standard">
      <style:paragraph-properties fo:line-height="150%" fo:text-align="center" style:justify-single-word="false"/>
      <style:text-properties style:font-name="Arial" officeooo:rsid="004d789a" officeooo:paragraph-rsid="0069d047"/>
    </style:style>
    <style:style style:name="P46" style:family="paragraph" style:parent-style-name="Standard">
      <style:paragraph-properties fo:line-height="150%" fo:text-align="justify" style:justify-single-word="false"/>
      <style:text-properties officeooo:paragraph-rsid="006d812d"/>
    </style:style>
    <style:style style:name="P47" style:family="paragraph" style:parent-style-name="Standard">
      <style:paragraph-properties fo:line-height="150%" fo:text-align="center" style:justify-single-word="false"/>
      <style:text-properties style:font-name="Arial" officeooo:rsid="004d789a" officeooo:paragraph-rsid="006fc6e0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Arial" officeooo:rsid="004d789a" officeooo:paragraph-rsid="0070f7db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Arial" fo:font-size="12pt" officeooo:rsid="004d789a" officeooo:paragraph-rsid="0070f7db" style:font-size-asian="12pt" style:font-size-complex="12pt"/>
    </style:style>
    <style:style style:name="P50" style:family="paragraph" style:parent-style-name="Standard">
      <style:paragraph-properties fo:line-height="150%" fo:text-align="center" style:justify-single-word="false"/>
      <style:text-properties style:font-name="Arial" officeooo:rsid="004d789a" officeooo:paragraph-rsid="0076bbbf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Arial" officeooo:rsid="004d789a" officeooo:paragraph-rsid="007889e7"/>
    </style:style>
    <style:style style:name="P52" style:family="paragraph" style:parent-style-name="Standard">
      <style:paragraph-properties fo:line-height="150%" fo:text-align="center" style:justify-single-word="false"/>
      <style:text-properties style:font-name="Arial" officeooo:rsid="004d789a" officeooo:paragraph-rsid="00740108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Arial" officeooo:rsid="004d789a" officeooo:paragraph-rsid="00753fce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Arial" fo:font-size="12pt" officeooo:rsid="004d789a" officeooo:paragraph-rsid="00753fce" style:font-size-asian="12pt" style:font-size-complex="12pt"/>
    </style:style>
    <style:style style:name="P55" style:family="paragraph" style:parent-style-name="Heading_20_1">
      <style:paragraph-properties fo:margin-top="0.423cm" fo:margin-bottom="0.212cm" style:contextual-spacing="false" fo:line-height="150%" fo:text-align="justify" style:justify-single-word="false" fo:break-before="page"/>
      <style:text-properties style:font-name="Arial" fo:font-size="12pt" officeooo:paragraph-rsid="000e17d0" style:font-size-asian="12pt" style:font-size-complex="12pt"/>
    </style:style>
    <style:style style:name="P56" style:family="paragraph" style:parent-style-name="Text_20_body" style:list-style-name="L2">
      <style:paragraph-properties fo:line-height="150%" fo:text-align="justify" style:justify-single-word="false"/>
      <style:text-properties style:font-name="Times New Roman" fo:font-size="12pt" officeooo:paragraph-rsid="002e81b5" style:font-size-asian="12pt" style:font-size-complex="12pt"/>
    </style:style>
    <style:style style:name="P57" style:family="paragraph" style:parent-style-name="Text_20_body" style:list-style-name="L2">
      <style:paragraph-properties fo:line-height="150%" fo:text-align="justify" style:justify-single-word="false"/>
      <style:text-properties style:font-name="Times New Roman" fo:font-size="12pt" officeooo:paragraph-rsid="002fd283" style:font-size-asian="12pt" style:font-size-complex="12pt"/>
    </style:style>
    <style:style style:name="T1" style:family="text">
      <style:text-properties fo:font-style="italic" officeooo:rsid="0009544f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d9bc0"/>
    </style:style>
    <style:style style:name="T4" style:family="text">
      <style:text-properties fo:font-size="16pt" style:font-size-complex="16pt"/>
    </style:style>
    <style:style style:name="T5" style:family="text">
      <style:text-properties style:font-name="Arial" fo:font-weight="normal" officeooo:rsid="00100330" style:font-weight-asian="normal" style:font-weight-complex="normal"/>
    </style:style>
    <style:style style:name="T6" style:family="text">
      <style:text-properties style:font-name="Arial"/>
    </style:style>
    <style:style style:name="T7" style:family="text">
      <style:text-properties style:text-position="0% 100%" style:font-name="Arial" fo:font-weight="normal" officeooo:rsid="00100330" style:font-weight-asian="normal" style:font-weight-complex="normal"/>
    </style:style>
    <style:style style:name="T8" style:family="text">
      <style:text-properties style:text-position="0% 100%" style:font-name="Arial" fo:font-weight="normal" style:font-weight-asian="normal" style:font-weight-complex="normal"/>
    </style:style>
    <style:style style:name="T9" style:family="text">
      <style:text-properties style:font-name="Arial" officeooo:rsid="00100330"/>
    </style:style>
    <style:style style:name="T10" style:family="text">
      <style:text-properties officeooo:rsid="0009d4ba"/>
    </style:style>
    <style:style style:name="T11" style:family="text">
      <style:text-properties style:font-name="Arial" officeooo:rsid="0016f2fb"/>
    </style:style>
    <style:style style:name="T12" style:family="text">
      <style:text-properties style:font-name="Arial" officeooo:rsid="0020fdad"/>
    </style:style>
    <style:style style:name="T13" style:family="text">
      <style:text-properties style:font-name="Arial" fo:font-weight="normal" officeooo:rsid="001916ba" style:font-weight-asian="normal" style:font-weight-complex="normal"/>
    </style:style>
    <style:style style:name="T14" style:family="text">
      <style:text-properties style:font-name="Arial" fo:font-weight="normal" officeooo:rsid="0020fdad" style:font-weight-asian="normal" style:font-weight-complex="normal"/>
    </style:style>
    <style:style style:name="T15" style:family="text">
      <style:text-properties style:font-name="Arial" officeooo:rsid="001916ba"/>
    </style:style>
    <style:style style:name="T16" style:family="text">
      <style:text-properties officeooo:rsid="004b1390"/>
    </style:style>
    <style:style style:name="T17" style:family="text">
      <style:text-properties officeooo:rsid="004d0e28"/>
    </style:style>
    <style:style style:name="T18" style:family="text">
      <style:text-properties officeooo:rsid="004f3c39"/>
    </style:style>
    <style:style style:name="T19" style:family="text">
      <style:text-properties officeooo:rsid="00370242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3af9aa"/>
    </style:style>
    <style:style style:name="T22" style:family="text">
      <style:text-properties officeooo:rsid="003e17c7"/>
    </style:style>
    <style:style style:name="T23" style:family="text">
      <style:text-properties officeooo:rsid="00598ab5"/>
    </style:style>
    <style:style style:name="T24" style:family="text">
      <style:text-properties officeooo:rsid="003f7709"/>
    </style:style>
    <style:style style:name="T25" style:family="text">
      <style:text-properties officeooo:rsid="00406225"/>
    </style:style>
    <style:style style:name="T26" style:family="text">
      <style:text-properties officeooo:rsid="00628493"/>
    </style:style>
    <style:style style:name="T27" style:family="text">
      <style:text-properties officeooo:rsid="00740108"/>
    </style:style>
    <style:style style:name="T28" style:family="text">
      <style:text-properties officeooo:rsid="006bcf04"/>
    </style:style>
    <style:style style:name="T29" style:family="text">
      <style:text-properties officeooo:rsid="00477141"/>
    </style:style>
    <style:style style:name="T30" style:family="text">
      <style:text-properties officeooo:rsid="0043d9c2"/>
    </style:style>
    <style:style style:name="T31" style:family="text">
      <style:text-properties officeooo:rsid="00500831"/>
    </style:style>
    <style:style style:name="T32" style:family="text">
      <style:text-properties officeooo:rsid="0045db4d"/>
    </style:style>
    <style:style style:name="T33" style:family="text">
      <style:text-properties officeooo:rsid="004d789a"/>
    </style:style>
    <style:style style:name="T34" style:family="text">
      <style:text-properties officeooo:rsid="0054bb5b"/>
    </style:style>
    <style:style style:name="T35" style:family="text">
      <style:text-properties officeooo:rsid="005235c8"/>
    </style:style>
    <style:style style:name="T36" style:family="text">
      <style:text-properties officeooo:rsid="00536a23"/>
    </style:style>
    <style:style style:name="T37" style:family="text">
      <style:text-properties fo:font-size="12pt" officeooo:rsid="004d789a" style:font-size-asian="12pt" style:font-size-complex="12pt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officeooo:rsid="00576cf0" style:font-size-asian="12pt" style:font-size-complex="12pt"/>
    </style:style>
    <style:style style:name="T40" style:family="text">
      <style:text-properties fo:font-size="12pt" officeooo:rsid="0058f375" style:font-size-asian="12pt" style:font-size-complex="12pt"/>
    </style:style>
    <style:style style:name="T41" style:family="text">
      <style:text-properties officeooo:rsid="005a9008"/>
    </style:style>
    <style:style style:name="T42" style:family="text">
      <style:text-properties style:font-name="Arial" fo:font-size="12pt" officeooo:rsid="004d789a" style:font-size-asian="12pt" style:font-size-complex="12pt"/>
    </style:style>
    <style:style style:name="T43" style:family="text">
      <style:text-properties style:font-name="Arial" fo:font-size="12pt" fo:font-weight="normal" officeooo:rsid="004d789a" style:font-size-asian="12pt" style:font-weight-asian="normal" style:font-size-complex="12pt" style:font-weight-complex="normal"/>
    </style:style>
    <style:style style:name="T44" style:family="text">
      <style:text-properties officeooo:rsid="00622106"/>
    </style:style>
    <style:style style:name="T45" style:family="text">
      <style:text-properties officeooo:rsid="006444d7"/>
    </style:style>
    <style:style style:name="T46" style:family="text">
      <style:text-properties officeooo:rsid="00663bc2"/>
    </style:style>
    <style:style style:name="T47" style:family="text">
      <style:text-properties fo:font-size="12pt" officeooo:rsid="006825a2" style:font-size-asian="12pt" style:font-size-complex="12pt"/>
    </style:style>
    <style:style style:name="T48" style:family="text">
      <style:text-properties fo:font-size="12pt" officeooo:rsid="006850b0" style:font-size-asian="12pt" style:font-size-complex="12pt"/>
    </style:style>
    <style:style style:name="T49" style:family="text">
      <style:text-properties officeooo:rsid="006cd233"/>
    </style:style>
    <style:style style:name="T50" style:family="text">
      <style:text-properties style:font-name="Arial" fo:font-size="12pt" style:font-size-asian="12pt" style:font-size-complex="12pt"/>
    </style:style>
    <style:style style:name="T51" style:family="text">
      <style:text-properties officeooo:rsid="0072e507"/>
    </style:style>
    <style:style style:name="T52" style:family="text">
      <style:text-properties officeooo:rsid="006fc6e0"/>
    </style:style>
    <style:style style:name="T53" style:family="text">
      <style:text-properties fo:font-size="12pt" officeooo:rsid="006fc6e0" style:font-size-asian="12pt" style:font-size-complex="12pt"/>
    </style:style>
    <style:style style:name="T54" style:family="text">
      <style:text-properties fo:font-size="12pt" fo:font-weight="normal" style:font-size-asian="12pt" style:font-weight-asian="normal" style:font-size-complex="12pt" style:font-weight-complex="normal"/>
    </style:style>
    <style:style style:name="T55" style:family="text">
      <style:text-properties officeooo:rsid="0076bbbf"/>
    </style:style>
    <style:style style:name="T56" style:family="text">
      <style:text-properties officeooo:rsid="0077237a"/>
    </style:style>
    <style:style style:name="T57" style:family="text">
      <style:text-properties fo:font-size="12pt" officeooo:rsid="007b4a65" style:font-size-asian="12pt" style:font-size-complex="12pt"/>
    </style:style>
    <style:style style:name="T58" style:family="text">
      <style:text-properties officeooo:rsid="0080a5f6"/>
    </style:style>
    <style:style style:name="T59" style:family="text">
      <style:text-properties officeooo:rsid="0080d955"/>
    </style:style>
    <style:style style:name="T60" style:family="text">
      <style:text-properties officeooo:rsid="000e17d0"/>
    </style:style>
    <style:style style:name="T61" style:family="text">
      <style:text-properties style:font-name="Arial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C714 — Sistemas Distribuídos</text:p>
      <text:p text:style-name="P2">Trabalho 2</text:p>
      <text:p text:style-name="P3"><text:span text:style-name="T1">João Guilherme Ferreira Pedra </text:span><text:span text:style-name="T2">— RA </text:span><text:span text:style-name="T1">248349</text:span></text:p>
      <text:p text:style-name="P4">1. Introdução</text:p>
      <text:p text:style-name="P5"><text:span text:style-name="T3"><text:tab/>Em s</text:span>istemas distribuídos, <text:span text:style-name="T3">temos algumas problemáticas importantes para refletir na transação entre processos:</text:span> ordena<text:span text:style-name="T3">ção de </text:span>eventos que ocorrem em processos diferentes, sem um relógio físico global comum; garantir que apenas um processo por vez acesse um recurso compartilhad<text:span text:style-name="T3">o; </text:span>e eleger um processo coordenador dentre vários, mesmo sem que os processos conheçam previamente o estado uns dos outros.</text:p>
      <text:p text:style-name="P5"><text:tab/>Este trabalho implementa um algoritmo para cada um desses problemas: Relógio Lógico de Lamport, Token Ring e Eleição em Anel integrados em um único sistema de nós que se comunicam por troca de mensagens reais via sockets TCP, executando em containers Docker distintos.</text:p>
      <text:p text:style-name="P6">2. <text:span text:style-name="T4">Algoritmos</text:span> Escolhidos</text:p>
      <text:p text:style-name="P7">2.1 Relógio Lógico de Lamport</text:p>
      <text:p text:style-name="P8"><text:span text:style-name="Strong_20_Emphasis"><text:span text:style-name="T5"><text:tab/>A partir do algoritmo descrito em [1], consegui utilizar a </text:span></text:span><text:span text:style-name="T6">lógica central da classe </text:span><text:span text:style-name="Source_20_Text"><text:span text:style-name="T6">LamportClock</text:span></text:span><text:span text:style-name="T6">, com os métodos </text:span><text:span text:style-name="Source_20_Text"><text:span text:style-name="T6">increment()</text:span></text:span><text:span text:style-name="T6"> e </text:span><text:span text:style-name="Source_20_Text"><text:span text:style-name="T6">update()</text:span></text:span><text:span text:style-name="T6"> (este último aplicando </text:span><text:span text:style-name="Source_20_Text"><text:span text:style-name="T6">max(local, recebido) + 1</text:span></text:span><text:span text:style-name="T6">), além do uso de um socket TCP simples para transmitir o timestamp entre processos.</text:span><text:span text:style-name="Strong_20_Emphasis"><text:span text:style-name="T6"> </text:span></text:span><text:span text:style-name="Strong_20_Emphasis"><text:span text:style-name="T7">Entretanto, dado o escopo diferente do projeto, foi </text:span></text:span><text:span text:style-name="T8">removida</text:span><text:span text:style-name="T6"> a interface de terminal do </text:span><text:span text:style-name="T9">p</text:span><text:span text:style-name="T6">rojeto original; a classe foi integrada ao loop principal do nó, que já recebe seus parâmetros (id, próximo nó do anel, portas) por linha de comando em vez de input interativo.</text:span></text:p>
      <text:p text:style-name="P9">2.2 Exclusão Mútua — Token Ring</text:p>
      <text:p text:style-name="P10">No algoritmo de token ring, utilizei a fonte consultada em [2], da qual foram aproveitados a lógica de posse do token (<text:span text:style-name="Source_20_Text"><text:span text:style-name="T6">has_token</text:span></text:span>) e a ideia geral da sequência de operações <text:span text:style-name="Source_20_Text"><text:span text:style-name="T6">requestToken → checkTokenAndEnterCS → enterCriticalSection → passToken</text:span></text:span>. O código original, no entanto, mantém uma fila de pedidos por processo, <text:soft-page-break/>já que o token é enviado diretamente para quem o solicitou, percorrendo o anel até encontrar quem está de posse dele (<text:span text:style-name="Source_20_Text"><text:span text:style-name="T6">next.requestToken(...)</text:span></text:span>). Como nesta implementação o token circula apenas em um sentido fixo a fila foi removida: um nó entra na seção crítica assim que recebe o token e possui um pedido pendente, repassando-o em seguida.</text:p>
      <text:p text:style-name="P10"><text:tab/>Além disso, a passagem do token deixou de ser uma chamada direta de método entre objetos na mesma JVM (<text:span text:style-name="Source_20_Text"><text:span text:style-name="T6">next.setToken(...)</text:span></text:span>) e passou a ser uma mensagem <text:span text:style-name="Source_20_Text"><text:span text:style-name="T6">TOKEN</text:span></text:span> enviada de fato pelo socket ao próximo nó do anel, já que os processos rodam em containers separados. O código também foi convertido de Java para Python.</text:p>
      <text:p text:style-name="P7">2.3 Eleição de Líde<text:span text:style-name="T10">r</text:span></text:p>
      <text:p text:style-name="P11"><text:span text:style-name="T11"><text:tab/>A ideia central do algortimo [3] seria que</text:span><text:span text:style-name="T6"> cada processo repassa o maior id visto, o id que "dá a volta" completa se torna coordenador, e uma mensagem de coordenador circula avisando todos os processos. </text:span><text:span text:style-name="T12">Porém</text:span><text:span text:style-name="T13">, </text:span><text:span text:style-name="T14">há uma </text:span><text:span text:style-name="T6">simula</text:span><text:span text:style-name="T12">ção de </text:span><text:span text:style-name="T6">todo o processo dentro de um único script Python, percorrendo uma lista </text:span><text:span text:style-name="Source_20_Text"><text:span text:style-name="T6">self.processes</text:span></text:span><text:span text:style-name="T6"> e usando </text:span><text:span text:style-name="Source_20_Text"><text:span text:style-name="T6">print()</text:span></text:span><text:span text:style-name="T6"> para representar a troca de mensagens. </text:span><text:span text:style-name="T15">N</text:span><text:span text:style-name="T6">esta implementação a mensagem ELECTION/ELECTED é enviada por socket entre processos distintos, e a detecção de "a mensagem voltou ao remetente original" é feita comparando o id do candidato recebido com o próprio id do nó.</text:span></text:p>
      <text:p text:style-name="P12">3. Arquitetura da Implementação</text:p>
      <text:p text:style-name="P13"><text:tab/>O sistema é composto por N nós organizados em topologia de anel. Cada nó é um processo Python independente, executado em um container Docker próprio, que:</text:p>
      <text:list text:style-name="L1">
        <text:list-item>
          <text:p text:style-name="P14">Escuta conexões TCP de entrada em uma porta fixa (o nó anterior do anel) [<text:span text:style-name="T16">4</text:span>]; </text:p>
        </text:list-item>
        <text:list-item>
          <text:p text:style-name="P14">Mantém uma conexão TCP de saída para o próximo nó do anel [<text:span text:style-name="T16">4</text:span>]; </text:p>
        </text:list-item>
        <text:list-item>
          <text:p text:style-name="P14">Troca mensagens no formato JSON, delimitadas por quebra de linha (\n), contendo tipo, remetente, dado e timestamp lógico [<text:span text:style-name="T16">5</text:span>]; </text:p>
        </text:list-item>
        <text:list-item>
          <text:p text:style-name="P15">Executa em paralelo as três lógicas: relógio de Lamport [<text:span text:style-name="T16">1</text:span>], exclusão mútua por token ring [<text:span text:style-name="T16">2</text:span>] e eleição em anel [<text:span text:style-name="T16">3</text:span>]. </text:p>
        </text:list-item>
      </text:list>
      <text:p text:style-name="P16"><text:tab/>Os containers são orquestrados via Docker Compose, em uma rede bridge dedicada (app_network) [6], o que permite que cada nó resolva o próximo nó do anel <text:soft-page-break/>pelo nome do serviço (ex.: node1, node2, ...) em vez de endereço IP fixo.</text:p>
      <text:p text:style-name="P9"/>
      <text:p text:style-name="P17">3.1 Diagrama de Componentes (descrição textual)</text:p>
      <text:p text:style-name="P18">node0 → node1 → node2 → node3 → node4 → node0 (anel fechado).</text:p>
      <text:p text:style-name="P19"><text:tab/>Cada seta representa uma conexão TCP unidirecional estabelecida na inicialização. Mensagens ELECTION, ELECTED, TOKEN, TOKEN_REQUEST e LAMPORT_EVENTO trafegam nesse sentido único.</text:p>
      <text:p text:style-name="P7">3.2 <text:span text:style-name="T17">Arquitetura</text:span></text:p>
      <text:p text:style-name="P20"><draw:frame draw:style-name="fr1" draw:name="Image1" text:anchor-type="char" svg:x="1.252cm" svg:y="-0.36cm" svg:width="13.494cm" svg:height="9.072cm" draw:z-index="0"><draw:image xlink:href="Pictures/10000001000001FE000001684AA914D6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2">Fig 1: <text:span text:style-name="T18">Estrutura</text:span> de arquivos.</text:p>
      <text:p text:style-name="P23"><text:span text:style-name="T19">4</text:span>. Testes e Experimentos</text:p>
      <text:p text:style-name="P13"><text:tab/>Os testes a seguir verificam as propriedades fundamentais de cada algoritmo, incluindo comportamento em situações normais e em cenários de limite/falha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4">#</text:p>
          </table:table-cell>
          <table:table-cell table:style-name="Table2.A1" office:value-type="string">
            <text:p text:style-name="P24">Algoritmo</text:p>
          </table:table-cell>
          <table:table-cell table:style-name="Table2.A1" office:value-type="string">
            <text:p text:style-name="P24">Teste</text:p>
          </table:table-cell>
          <table:table-cell table:style-name="Table2.A1" office:value-type="string">
            <text:p text:style-name="P24">Comando(s)</text:p>
          </table:table-cell>
          <table:table-cell table:style-name="Table2.A1" office:value-type="string">
            <text:p text:style-name="P25"><text:span text:style-name="T20">Resultado esperado</text:span></text:p>
          </table:table-cell>
        </table:table-row>
        <table:table-row table:style-name="Table2.1">
          <table:table-cell table:style-name="Table2.A2" office:value-type="string">
            <text:p text:style-name="P26">T1.1</text:p>
          </table:table-cell>
          <table:table-cell table:style-name="Table2.B2" office:value-type="string">
            <text:p text:style-name="P26">Lamport</text:p>
          </table:table-cell>
          <table:table-cell table:style-name="Table2.C2" office:value-type="string">
            <text:p text:style-name="P26"><text:span text:style-name="T21">C</text:span>ausalidade respeitada</text:p>
          </table:table-cell>
          <table:table-cell table:style-name="Table2.D2" office:value-type="string">
            <text:p text:style-name="P26">docker compose up --build / docker compose logs node0 node1</text:p>
          </table:table-cell>
          <table:table-cell table:style-name="Table2.E2" office:value-type="string">
            <text:p text:style-name="P26">Timestamp do evento recebido é sempre maior que o do evento causador</text:p>
          </table:table-cell>
        </table:table-row>
        <table:table-row table:style-name="Table2.1">
          <table:table-cell table:style-name="Table2.A3" office:value-type="string">
            <text:p text:style-name="P26">T1.2</text:p>
          </table:table-cell>
          <table:table-cell table:style-name="Table2.B3" office:value-type="string">
            <text:p text:style-name="P26">Lamport</text:p>
          </table:table-cell>
          <table:table-cell table:style-name="Table2.C3" office:value-type="string">
            <text:p text:style-name="P26">Mensagem atrasada</text:p>
          </table:table-cell>
          <table:table-cell table:style-name="Table2.D3" office:value-type="string">
            <text:p text:style-name="P26">Inserir time.sleep antes de um envio; rodar normalmente</text:p>
          </table:table-cell>
          <table:table-cell table:style-name="Table2.E3" office:value-type="string">
            <text:p text:style-name="P26">Relógio ainda converge corretamente via max(local, recebido) + 1</text:p>
          </table:table-cell>
        </table:table-row>
        <table:table-row table:style-name="Table2.1">
          <table:table-cell table:style-name="Table2.A4" office:value-type="string">
            <text:p text:style-name="P26">T1.3</text:p>
          </table:table-cell>
          <table:table-cell table:style-name="Table2.B4" office:value-type="string">
            <text:p text:style-name="P26">Lamport</text:p>
          </table:table-cell>
          <table:table-cell table:style-name="Table2.C4" office:value-type="string">
            <text:p text:style-name="P26">Eventos concorrentes (sem relação causal)</text:p>
          </table:table-cell>
          <table:table-cell table:style-name="Table2.D4" office:value-type="string">
            <text:p text:style-name="P26">docker-compose logs node2 node4</text:p>
          </table:table-cell>
          <table:table-cell table:style-name="Table2.E4" office:value-type="string">
            <text:p text:style-name="P26">Podem ocorrer timestamps iguais/fora de ordem real — limitação conhecida do algoritmo</text:p>
          </table:table-cell>
        </table:table-row>
        <table:table-row table:style-name="Table2.1">
          <table:table-cell table:style-name="Table2.A5" office:value-type="string">
            <text:p text:style-name="P26">T2.1</text:p>
          </table:table-cell>
          <table:table-cell table:style-name="Table2.B5" office:value-type="string">
            <text:p text:style-name="P26">Token Ring</text:p>
          </table:table-cell>
          <table:table-cell table:style-name="Table2.C5" office:value-type="string">
            <text:p text:style-name="P26"><text:span text:style-name="T22">S</text:span>egurança e vivacidade</text:p>
          </table:table-cell>
          <table:table-cell table:style-name="Table2.D5" office:value-type="string">
            <text:p text:style-name="P26">docker-compose logs | grep <text:span text:style-name="T23">ENTERED</text:span>|<text:span text:style-name="T23">EXIT</text:span></text:p>
          </table:table-cell>
          <table:table-cell table:style-name="Table2.E5" office:value-type="string">
            <text:p text:style-name="P26">Nunca dois nós em <text:span text:style-name="T24">seção crítica</text:span> simultaneamente; todo pedido é eventualmente atendido</text:p>
          </table:table-cell>
        </table:table-row>
        <table:table-row table:style-name="Table2.1">
          <table:table-cell table:style-name="Table2.A6" office:value-type="string">
            <text:p text:style-name="P26">T2.2</text:p>
          </table:table-cell>
          <table:table-cell table:style-name="Table2.B6" office:value-type="string">
            <text:p text:style-name="P26">Token Ring</text:p>
          </table:table-cell>
          <table:table-cell table:style-name="Table2.C6" office:value-type="string">
            <text:p text:style-name="P26">Nó cai antes de repassar o token</text:p>
          </table:table-cell>
          <table:table-cell table:style-name="Table2.D6" office:value-type="string">
            <text:p text:style-name="P26">Docker-<text:span text:style-name="T25">compose </text:span>stop nodeX</text:p>
          </table:table-cell>
          <table:table-cell table:style-name="Table2.E6" office:value-type="string">
            <text:p text:style-name="P26">Anel trava: token nunca mais circula para os nós após X</text:p>
          </table:table-cell>
        </table:table-row>
        <text:soft-page-break/>
        <table:table-row table:style-name="Table2.1">
          <table:table-cell table:style-name="Table2.A7" office:value-type="string">
            <text:p text:style-name="P26">T2.3</text:p>
          </table:table-cell>
          <table:table-cell table:style-name="Table2.B7" office:value-type="string">
            <text:p text:style-name="P26">Token Ring</text:p>
          </table:table-cell>
          <table:table-cell table:style-name="Table2.C7" office:value-type="string">
            <text:p text:style-name="P26">Nó cai durante a seção crítica</text:p>
          </table:table-cell>
          <table:table-cell table:style-name="Table2.D7" office:value-type="string">
            <text:p text:style-name="P26">Docker-<text:span text:style-name="T26">compose </text:span>stop &lt;container em SC&gt;</text:p>
          </table:table-cell>
          <table:table-cell table:style-name="Table2.E7" office:value-type="string">
            <text:p text:style-name="P26">Token se perde; nenhum outro nó consegue entrar na SC (deadlock)</text:p>
          </table:table-cell>
        </table:table-row>
        <table:table-row table:style-name="Table2.1">
          <table:table-cell table:style-name="Table2.A8" office:value-type="string">
            <text:p text:style-name="P26">T3.1</text:p>
          </table:table-cell>
          <table:table-cell table:style-name="Table2.B8" office:value-type="string">
            <text:p text:style-name="P26">Eleição</text:p>
          </table:table-cell>
          <table:table-cell table:style-name="Table2.C8" office:value-type="string">
            <text:p text:style-name="P26"><text:span text:style-name="T26">C</text:span>onvergência</text:p>
          </table:table-cell>
          <table:table-cell table:style-name="Table2.D8" office:value-type="string">
            <text:p text:style-name="P26">docker compose logs | grep "LIDER CONFIRMADO"</text:p>
          </table:table-cell>
          <table:table-cell table:style-name="Table2.E8" office:value-type="string">
            <text:p text:style-name="P26">Todos os nós concordam no mesmo líder (maior ID ativo)</text:p>
          </table:table-cell>
        </table:table-row>
        <table:table-row table:style-name="Table2.1">
          <table:table-cell table:style-name="Table2.A9" office:value-type="string">
            <text:p text:style-name="P26">T3.2</text:p>
          </table:table-cell>
          <table:table-cell table:style-name="Table2.B9" office:value-type="string">
            <text:p text:style-name="P26">Eleição</text:p>
          </table:table-cell>
          <table:table-cell table:style-name="Table2.C9" office:value-type="string">
            <text:p text:style-name="P26">Duas eleições simultâneas</text:p>
          </table:table-cell>
          <table:table-cell table:style-name="Table2.D9" office:value-type="string">
            <text:p text:style-name="P26">Dois nós chamam start() quase ao mesmo tempo</text:p>
          </table:table-cell>
          <table:table-cell table:style-name="Table2.E9" office:value-type="string">
            <text:p text:style-name="P26">Anel converge para um único líder mesmo com concorrência</text:p>
          </table:table-cell>
        </table:table-row>
        <table:table-row table:style-name="Table2.1">
          <table:table-cell table:style-name="Table2.A10" office:value-type="string">
            <text:p text:style-name="P26">T3.3</text:p>
          </table:table-cell>
          <table:table-cell table:style-name="Table2.B10" office:value-type="string">
            <text:p text:style-name="P26">Eleição</text:p>
          </table:table-cell>
          <table:table-cell table:style-name="Table2.C10" office:value-type="string">
            <text:p text:style-name="P26">Líder cai antes de anunciar</text:p>
          </table:table-cell>
          <table:table-cell table:style-name="Table2.D10" office:value-type="string">
            <text:p text:style-name="P26">docker-<text:span text:style-name="T27">compose</text:span> stop &lt;líder&gt; logo após "SOU O LIDER"</text:p>
          </table:table-cell>
          <table:table-cell table:style-name="Table2.E10" office:value-type="string">
            <text:p text:style-name="P26">Nenhum ELECTED circula; anel fica sem líder confirmado</text:p>
          </table:table-cell>
        </table:table-row>
        <table:table-row table:style-name="Table2.1">
          <table:table-cell table:style-name="Table2.A11" office:value-type="string">
            <text:p text:style-name="P26">T3.4</text:p>
          </table:table-cell>
          <table:table-cell table:style-name="Table2.B11" office:value-type="string">
            <text:p text:style-name="P26">Eleição</text:p>
          </table:table-cell>
          <table:table-cell table:style-name="Table2.C11" office:value-type="string">
            <text:p text:style-name="P26">Nó cai durante repasse do candidato</text:p>
          </table:table-cell>
          <table:table-cell table:style-name="Table2.D11" office:value-type="string">
            <text:p text:style-name="P26">docker-<text:span text:style-name="T28">container</text:span> stop &lt;nó&gt; durante "encaminhando candidato"</text:p>
          </table:table-cell>
          <table:table-cell table:style-name="Table2.E11" office:value-type="string">
            <text:p text:style-name="P26">Mensagem nunca completa a volta; eleição trava</text:p>
          </table:table-cell>
        </table:table-row>
      </table:table>
      <text:p text:style-name="P27"><text:soft-page-break/>6. Resultados</text:p>
      <text:p text:style-name="P28"><text:span text:style-name="T29">6.1 </text:span>T<text:span text:style-name="T30">este </text:span>1.1</text:p>
      <text:p text:style-name="P29"><draw:frame draw:style-name="fr2" draw:name="Image2" text:anchor-type="char" svg:width="16cm" svg:height="8.855cm" draw:z-index="1"><draw:image xlink:href="Pictures/10000001000002C7000001DE78C976C5.png" xlink:type="simple" xlink:show="embed" xlink:actuate="onLoad" draw:mime-type="image/png"/></draw:frame>Fig <text:span text:style-name="T31">2</text:span>: <text:span text:style-name="T31">Teste 1.1 – Envio e recebimento de um evento de Relógio de Lamport.</text:span></text:p>
      <text:p text:style-name="P29"/>
      <text:p text:style-name="P30"><text:tab/>O trecho de log <text:span text:style-name="T31">mostra</text:span> a propriedade do relógio de Lamport: o evento de envio no node4 (T=1) precede causalmente o evento de recebimento no node0 (T=2), respeitando a relação happened-before.</text:p>
      <text:p text:style-name="P31"><text:span text:style-name="T29">6.2 </text:span>T<text:span text:style-name="T30">este </text:span>1.<text:span text:style-name="T32">2</text:span><draw:frame draw:style-name="fr3" draw:name="Image5" text:anchor-type="char" svg:x="3.752cm" svg:y="1.189cm" svg:width="8.497cm" svg:height="2.297cm" draw:z-index="4"><draw:image xlink:href="Pictures/10000001000001E100000082CF12DBDB.png" xlink:type="simple" xlink:show="embed" xlink:actuate="onLoad" draw:mime-type="image/png"/></draw:frame></text:p>
      <text:p text:style-name="P32"><text:span text:style-name="T33">Fig </text:span><text:span text:style-name="T34">3.1</text:span><text:span text:style-name="T33">: </text:span><text:span text:style-name="T31">Teste 1.</text:span><text:span text:style-name="T35">2</text:span><text:span text:style-name="T31"> – </text:span><text:span text:style-name="T35">Adicionado atraso no relógio de </text:span><text:span text:style-name="T36">L</text:span><text:span text:style-name="T35">amport</text:span><text:span text:style-name="T31">.</text:span></text:p>
      <text:p text:style-name="P33">Fig <text:span text:style-name="T34">3.2</text:span>: <text:span text:style-name="T31">Teste </text:span><draw:frame draw:style-name="fr3" draw:name="Image4" text:anchor-type="char" svg:x="3.736cm" svg:y="0.247cm" svg:width="8.92cm" svg:height="2.538cm" draw:z-index="3"><draw:image xlink:href="Pictures/100000010000024B000000A7E3978625.png" xlink:type="simple" xlink:show="embed" xlink:actuate="onLoad" draw:mime-type="image/png"/></draw:frame><text:span text:style-name="T31">1.</text:span><text:span text:style-name="T35">2</text:span><text:span text:style-name="T31"> – Envio e recebimento de um evento de Relógio de Lamport </text:span><text:span text:style-name="T36">com atraso</text:span><text:span text:style-name="T31">.</text:span></text:p>
      <text:p text:style-name="P33"/>
      <text:p text:style-name="P34"><text:span text:style-name="T37"><text:tab/></text:span><text:span text:style-name="T38">O trecho de log evidencia que, mesmo havendo um atraso </text:span><text:span text:style-name="T39">de</text:span><text:span text:style-name="T38"> rede de aproximadamente 4 segundos entre o envio (wall-clock 00:02:54) e o recebimento (wall-clock 00:02:58) da mensagem, o relógio lógico de Lamport manteve a relação causal esperada (T=1 no envio, T=2 no recebimento), confirmando </text:span><text:span text:style-name="T40">que </text:span><text:span text:style-name="T38">a ordenação lógica dos eventos não depende do tempo real de entrega.</text:span></text:p>
      <text:p text:style-name="P31"><text:soft-page-break/><text:span text:style-name="T29">6.3 </text:span>T<text:span text:style-name="T30">este </text:span><text:span text:style-name="T32">2</text:span>.1</text:p>
      <text:p text:style-name="P35"><draw:frame draw:style-name="fr4" draw:name="Image6" text:anchor-type="char" svg:width="12.525cm" svg:height="4.255cm" draw:z-index="5"><draw:image xlink:href="Pictures/1000000100000247000000C6A8845FD6.png" xlink:type="simple" xlink:show="embed" xlink:actuate="onLoad" draw:mime-type="image/png"/></draw:frame><text:span text:style-name="T41">Fig 4 </text:span><text:span text:style-name="T31">– </text:span><text:span text:style-name="T41">Funcionamento do algoritmo de Token Ring</text:span><text:span text:style-name="T31">.</text:span></text:p>
      <text:p text:style-name="P36"><text:tab/></text:p>
      <text:p text:style-name="P37"><text:span text:style-name="T42"><text:tab/>O trecho de log evidencia o funcionamento do algoritmo de exclusão mútua por Token Ring após a conclusão da eleição de líder. O nó 0, de posse do token inicial, solicita a seção crítica (T=22), entra (T=23) e sai dela (T=24) antes de repassar o token ao próximo nó do anel (T=25). O nó 1, que já havia solicitado a seção crítica anteriormente (T=24), só recebe o token depois que o nó 0 efetivamente saiu da seção crítica, confirmando a propriedade de </text:span><text:span text:style-name="Strong_20_Emphasis"><text:span text:style-name="T43">segurança</text:span></text:span><text:span text:style-name="T42">. A circulação contínua do token entre os nós também garante a propriedade de </text:span><text:span text:style-name="Strong_20_Emphasis"><text:span text:style-name="T43">vivacidade</text:span></text:span><text:span text:style-name="T42">, já que todo nó que solicitar a seção crítica eventualmente receberá o token e poderá entrar.</text:span></text:p>
      <text:p text:style-name="P38"/>
      <text:p text:style-name="P28"><text:span text:style-name="T29">6.4 </text:span>T<text:span text:style-name="T30">este </text:span><text:span text:style-name="T32">2</text:span>.<text:span text:style-name="T32">2</text:span></text:p>
      <text:p text:style-name="P39"><draw:frame draw:style-name="fr5" draw:name="Image8" text:anchor-type="char" svg:width="16cm" svg:height="1.136cm" draw:z-index="7"><draw:image xlink:href="Pictures/10000001000002A4000000309AFA74C9.png" xlink:type="simple" xlink:show="embed" xlink:actuate="onLoad" draw:mime-type="image/png"/></draw:frame><text:span text:style-name="T41">Fig </text:span><text:span text:style-name="T26">5.1</text:span><text:span text:style-name="T41"> </text:span><text:span text:style-name="T31">– </text:span><text:span text:style-name="T26">Nó 3 é desligado</text:span><text:span text:style-name="T31">.</text:span></text:p>
      <text:p text:style-name="P40"><draw:frame draw:style-name="fr4" draw:name="Image7" text:anchor-type="char" svg:width="11.113cm" svg:height="5.766cm" draw:z-index="6"><draw:image xlink:href="Pictures/10000001000002480000012F32C3CC1B.png" xlink:type="simple" xlink:show="embed" xlink:actuate="onLoad" draw:mime-type="image/png"/></draw:frame><text:span text:style-name="T41">Fig </text:span><text:span text:style-name="T26">5.2</text:span><text:span text:style-name="T41"> </text:span><text:span text:style-name="T31">– </text:span><text:span text:style-name="T41">Funcionamento do algoritmo de Token Ring </text:span><text:span text:style-name="T44">ao fazer o nó 3 falhar</text:span><text:span text:style-name="T31">.</text:span></text:p>
      <text:p text:style-name="P41"><text:span text:style-name="T38"><text:tab/>O trecho de log evidencia a limitação do algoritmo de Token Ring frente à falha de um nó. O nó 2 passou o token ao nó 3 (</text:span><text:span text:style-name="Source_20_Text"><text:span text:style-name="T38">passing TOKEN to next node</text:span></text:span><text:span text:style-name="T38">), que foi encerrado imediatamente após (</text:span><text:span text:style-name="Source_20_Text"><text:span text:style-name="T38">node3 exited with code 137</text:span></text:span><text:span text:style-name="T38">, </text:span><text:soft-page-break/><text:span text:style-name="T38">sinalizando finalização forçada via </text:span><text:span text:style-name="Source_20_Text"><text:span text:style-name="T38">docker stop</text:span></text:span><text:span text:style-name="T38">). A partir desse ponto, nenhuma nova mensagem </text:span><text:span text:style-name="Source_20_Text"><text:span text:style-name="T38">TOKEN</text:span></text:span><text:span text:style-name="T38"> circula pelo anel, e nenhum nó consegue mais entrar em seção crítica. Isso confirma que o token, ao se perder junto com o processo que o detinha, não é regenerado automaticamente, evidenciando a ausência de tolerância a falhas nesse algoritmo em sua forma clássica.</text:span></text:p>
      <text:p text:style-name="P42"><text:span text:style-name="T29">6.5 </text:span>T<text:span text:style-name="T30">este </text:span><text:span text:style-name="T32">2</text:span>.<text:span text:style-name="T32">3</text:span></text:p>
      <text:p text:style-name="P43"><draw:frame draw:style-name="fr5" draw:name="Image10" text:anchor-type="char" svg:width="16cm" svg:height="1.15cm" draw:z-index="9"><draw:image xlink:href="Pictures/10000001000002A9000000316865122E.png" xlink:type="simple" xlink:show="embed" xlink:actuate="onLoad" draw:mime-type="image/png"/></draw:frame><text:span text:style-name="T41">Fig </text:span><text:span text:style-name="T45">6</text:span><text:span text:style-name="T26">.</text:span><text:span text:style-name="T45">1</text:span><text:span text:style-name="T41"> </text:span><text:span text:style-name="T31">– </text:span><text:span text:style-name="T46">Nó 2 é desligado</text:span><text:span text:style-name="T31">.</text:span></text:p>
      <text:p text:style-name="P31"><draw:frame draw:style-name="fr6" draw:name="Image9" text:anchor-type="char" svg:width="14.87cm" svg:height="1.879cm" draw:z-index="8"><draw:image xlink:href="Pictures/1000000100000232000000477969C990.png" xlink:type="simple" xlink:show="embed" xlink:actuate="onLoad" draw:mime-type="image/png"/></draw:frame></text:p>
      <text:p text:style-name="P43"/>
      <text:p text:style-name="P43"/>
      <text:p text:style-name="P43"><text:span text:style-name="T41">Fig </text:span><text:span text:style-name="T45">6</text:span><text:span text:style-name="T26">.2</text:span><text:span text:style-name="T41"> </text:span><text:span text:style-name="T31">– </text:span><text:span text:style-name="T41">Funcionamento do algoritmo de Token Ring </text:span><text:span text:style-name="T44">ao fazer o </text:span><text:span text:style-name="T46">nó 2 falhar não passa ticket para próximo nó</text:span><text:span text:style-name="T31">.</text:span></text:p>
      <text:p text:style-name="P44"><text:span text:style-name="T38"><text:tab/>O trecho de log evidencia o encerramento abrupto do nó 2 (</text:span><text:span text:style-name="Source_20_Text"><text:span text:style-name="T38">node2 exited with code 137</text:span></text:span><text:span text:style-name="Source_20_Text"><text:span text:style-name="T47">).</text:span></text:span><text:span text:style-name="T38"> Após a queda, nenhuma nova mensagem de </text:span><text:span text:style-name="Source_20_Text"><text:span text:style-name="T38">TOKEN</text:span></text:span><text:span text:style-name="T38"> ou de entrada/saída em seção crítica é observada no restante do log, indicando que o toke</text:span><text:span text:style-name="T48">n </text:span><text:span text:style-name="T38">foi perdido junto com o processo e não foi mais recuperado. Isso confirma a mesma limitação identificada no teste T2.2: o algoritmo de Token Ring, em sua forma clássica, não possui mecanismo de regeneração do token após a falha do processo que o detém, resultando em impossibilidade permanente de acesso à seção crítica pelos nós remanescentes.</text:span></text:p>
      <text:p text:style-name="P31"><text:soft-page-break/></text:p>
      <text:p text:style-name="P31"><text:span text:style-name="T29">6.7 </text:span>T<text:span text:style-name="T30">este </text:span><text:span text:style-name="T32">3</text:span>.<text:span text:style-name="T32">1</text:span></text:p>
      <text:p text:style-name="P45"><draw:frame draw:style-name="fr4" draw:name="Image3" text:anchor-type="char" svg:width="9.945cm" svg:height="8.151cm" draw:z-index="2"><draw:image xlink:href="Pictures/100000010000023B000001D4DEE8EBB9.png" xlink:type="simple" xlink:show="embed" xlink:actuate="onLoad" draw:mime-type="image/png"/></draw:frame><text:span text:style-name="T41">Fig </text:span><text:span text:style-name="T49">7</text:span><text:span text:style-name="T41"> </text:span><text:span text:style-name="T31">– </text:span><text:span text:style-name="T41">Funcionamento do algoritmo de </text:span><text:span text:style-name="T49">eleição</text:span><text:span text:style-name="T31">.</text:span></text:p>
      <text:p text:style-name="P46"><text:span text:style-name="T50"><text:tab/>O trecho de log evidencia o algoritmo de eleição em anel. Após o candidato de maior identificador (4) já ter sido determinado nas rodadas anteriores, a mensagem </text:span><text:span text:style-name="Source_20_Text"><text:span text:style-name="T50">ELECTION</text:span></text:span><text:span text:style-name="T50"> contendo esse valor continua circulando pelo anel — sendo repassada sequencialmente pelos nós 0, 1, 2 e 3 (</text:span><text:span text:style-name="Source_20_Text"><text:span text:style-name="T50">forwarding candidate 4</text:span></text:span><text:span text:style-name="T50">) sem qualquer alteração, já que nenhum deles possui identificador maior. Quando a mensagem retorna ao nó 4, este reconhece seu próprio identificador como o valor circulado e declara-se líder (</text:span><text:span text:style-name="Source_20_Text"><text:span text:style-name="T50">I AM THE LEADER</text:span></text:span><text:span text:style-name="T50">), disparando o envio da mensagem </text:span><text:span text:style-name="Source_20_Text"><text:span text:style-name="T50">ELECTED</text:span></text:span><text:span text:style-name="T50">. <text:tab/>Esse comportamento confirma a propriedade central do algoritmo: a eleição converge corretamente para o processo de maior identificador do anel, e a detecção de que a mensagem completou uma volta completa é feita exclusivamente pela comparação do candidato recebido com o próprio identificador do nó, sem necessidade de qualquer contagem explícita de voltas.</text:span></text:p>
      <text:p text:style-name="P31"><text:soft-page-break/><text:span text:style-name="T29">6.8 </text:span>T<text:span text:style-name="T30">este </text:span><text:span text:style-name="T32">3</text:span>.<text:span text:style-name="T32">2</text:span></text:p>
      <text:p text:style-name="P47"><draw:frame draw:style-name="fr3" draw:name="Image11" text:anchor-type="char" svg:x="3.496cm" svg:y="0.053cm" svg:width="9.006cm" svg:height="6.932cm" draw:z-index="10"><draw:image xlink:href="Pictures/1000000100000287000001F248EC4B53.png" xlink:type="simple" xlink:show="embed" xlink:actuate="onLoad" draw:mime-type="image/png"/></draw:frame><text:span text:style-name="T41">Fig </text:span><text:span text:style-name="T51">8</text:span><text:span text:style-name="T41"> </text:span><text:span text:style-name="T31">– </text:span><text:span text:style-name="T41">Funcionamento do algoritmo de </text:span><text:span text:style-name="T49">eleição </text:span><text:span text:style-name="T52">com duas eleições ao mesmo tempo</text:span><text:span text:style-name="T31">.</text:span></text:p>
      <text:p text:style-name="P48"><text:span text:style-name="T38"><text:tab/>O trecho de log </text:span><text:span text:style-name="T53">mostra o</text:span><text:span text:style-name="T38"> comportamento do algoritmo de eleição em anel quando duas eleições são iniciadas simultaneamente (nós 0 e 1, nesta execução). Observa-se que cada nó do anel recebe </text:span><text:span text:style-name="Strong_20_Emphasis"><text:span text:style-name="T54">duas</text:span></text:span><text:span text:style-name="T54"> </text:span><text:span text:style-name="T38">mensagens </text:span><text:span text:style-name="Source_20_Text"><text:span text:style-name="T38">ELECTED</text:span></text:span><text:span text:style-name="T38"> (uma originada de cada eleição concorrente), como evidenciado pela duplicação de </text:span><text:span text:style-name="Source_20_Text"><text:span text:style-name="T38">leader confirmed: node 4</text:span></text:span><text:span text:style-name="T38"> em todos os nós.</text:span></text:p>
      <text:p text:style-name="P49"><text:tab/>Apesar da redundância de mensagens, ambas as eleições convergem corretamente para o mesmo líder (nó 4, o de maior identificador do anel), confirmando que o algoritmo mantém a corretude mesmo sob concorrência de múltiplas eleições. A duplicação de mensagens, entretanto, evidencia uma ineficiência: o algoritmo, em sua forma básica, não possui mecanismo para detectar e descartar eleições redundantes já resolvidas por outra em andamento.</text:p>
      <text:p text:style-name="P31"><text:soft-page-break/><text:span text:style-name="T29">6.9 </text:span>T<text:span text:style-name="T30">este </text:span><text:span text:style-name="T32">3</text:span>.<text:span text:style-name="T32">3</text:span></text:p>
      <text:p text:style-name="P50"><draw:frame draw:style-name="fr6" draw:name="Image13" text:anchor-type="char" svg:width="15.637cm" svg:height="7.699cm" draw:z-index="12"><draw:image xlink:href="Pictures/100000010000024F00000123980DFF44.png" xlink:type="simple" xlink:show="embed" xlink:actuate="onLoad" draw:mime-type="image/png"/></draw:frame><text:span text:style-name="T41">Fig </text:span><text:span text:style-name="T27">10</text:span><text:span text:style-name="T41"> </text:span><text:span text:style-name="T31">– </text:span><text:span text:style-name="T41">Funcionamento do algoritmo de </text:span><text:span text:style-name="T49">eleição </text:span><text:span text:style-name="T52">com </text:span><text:span text:style-name="T27">nó 4 parado </text:span><text:span text:style-name="T55">depois </text:span><text:span text:style-name="T56">de se confirmar como líder</text:span><text:span text:style-name="T31">.</text:span></text:p>
      <text:p text:style-name="P51"><text:span text:style-name="T38"><text:tab/>O trecho de log evidencia o comportamento do sistema quando o nó vencedor da eleição falha antes de anunciar sua liderança aos demais. O nó 4 reconhece que é o processo de maior identificador do anel (</text:span><text:span text:style-name="Source_20_Text"><text:span text:style-name="T38">I AM THE LEADER (id=4), sending ELECTED</text:span></text:span><text:span text:style-name="T38">), porém é encerrado (</text:span><text:span text:style-name="Source_20_Text"><text:span text:style-name="T38">node4 exited with code 137</text:span></text:span><text:span text:style-name="T38">) antes de efetivamente transmitir a mensagem </text:span><text:span text:style-name="Source_20_Text"><text:span text:style-name="T38">ELECTED</text:span></text:span><text:span text:style-name="T38"> pela rede.</text:span></text:p>
      <text:p text:style-name="P51"><text:span text:style-name="T38"><text:tab/>Como resultado, nenhum outro nó do anel recebe a confirmação do novo líder — a mensagem </text:span><text:span text:style-name="Source_20_Text"><text:span text:style-name="T38">leader confirmed</text:span></text:span><text:span text:style-name="T38"> não aparece em nenhum log subsequente. Isso evidencia uma limitação crítica do algoritmo: mesmo tendo determinado corretamente o vencedor da eleição, a ausência de um mecanismo de confirmação com timeout ou retransmissão faz com que o anel permaneça indefinidamente sem coordenador confirmado, exigindo uma nova eleição </text:span><text:span text:style-name="T57">para </text:span><text:span text:style-name="T38">restabelecer a liderança.</text:span></text:p>
      <text:p text:style-name="P31"><text:soft-page-break/><text:span text:style-name="T29">6.10 </text:span>T<text:span text:style-name="T30">este </text:span><text:span text:style-name="T32">3</text:span>.<text:span text:style-name="T32">4</text:span></text:p>
      <text:p text:style-name="P52"><draw:frame draw:style-name="fr4" draw:name="Image12" text:anchor-type="char" svg:width="9.049cm" svg:height="6.615cm" draw:z-index="11"><draw:image xlink:href="Pictures/1000000100000269000001C354EB321F.png" xlink:type="simple" xlink:show="embed" xlink:actuate="onLoad" draw:mime-type="image/png"/></draw:frame><text:span text:style-name="T41">Fig </text:span><text:span text:style-name="T27">10</text:span><text:span text:style-name="T41"> </text:span><text:span text:style-name="T31">– </text:span><text:span text:style-name="T41">Funcionamento do algoritmo de </text:span><text:span text:style-name="T49">eleição </text:span><text:span text:style-name="T52">com </text:span><text:span text:style-name="T27">nó 4 parado antes da passagem dos candidatos</text:span><text:span text:style-name="T31">.</text:span></text:p>
      <text:p text:style-name="P53"><text:span text:style-name="T38">O trecho de log evidencia quando um nó falha durante a fase de propagação do candidato. As mensagens </text:span><text:span text:style-name="Source_20_Text"><text:span text:style-name="T38">ELECTION</text:span></text:span><text:span text:style-name="T38"> circularam normalmente entre os nós 1, 2 e 3, elevando o candidato de 1 para 3 (</text:span><text:span text:style-name="Source_20_Text"><text:span text:style-name="T38">forwarding candidate 1 → 2 → 3</text:span></text:span><text:span text:style-name="T38">). No entanto, o nó 4 — próximo destinatário no anel — foi encerrado (</text:span><text:span text:style-name="Source_20_Text"><text:span text:style-name="T38">node4 exited with code 137</text:span></text:span><text:span text:style-name="T38">) antes de processar e repassar a mensagem. A partir desse ponto, nenhuma nova mensagem </text:span><text:span text:style-name="Source_20_Text"><text:span text:style-name="T38">ELECTION</text:span></text:span><text:span text:style-name="T38"> ou </text:span><text:span text:style-name="Source_20_Text"><text:span text:style-name="T38">ELECTED</text:span></text:span><text:span text:style-name="T38"> é observada no log: a eleição trava permanentemente, pois a mensagem nunca completa a volta ao redor do anel.</text:span></text:p>
      <text:p text:style-name="P54"><text:tab/>Esse resultado evidencia a mesma limitação estrutural já observada no Token Ring (T2.2/T2.3): o algoritmo em anel, em sua forma clássica, depende da integridade contínua de todos os nós do anel para funcionar, não possuindo mecanismo de reconfiguração automática frente a falhas.</text:p>
      <text:p text:style-name="P27">7. Discussão e Limitações</text:p>
      <text:p text:style-name="P13"><text:tab/>Nenhum dos três algoritmos implementados trata falha de nó (fail-stop) nativamente, como evidenciado pelos testes T2.2, T2.3, T3.3 e T3.4. Em um anel físico ou lógico, a queda de qualquer processo interrompe a circulação de mensagens, travando tanto a exclusão mútua quanto a eleição. Soluções reais mitigam esse problema com mecanismos de heartbeat e timeout para detectar falhas e disparar reconfiguração do anel ou nova eleição, conforme discutido em aula. Além disso, o relógio de Lamport, por definição, não captura concorrência real entre eventos (T1.3), para isso seriam necessários vetores de relógio.</text:p>
      <text:p text:style-name="P27"><text:soft-page-break/>8. Conclusão</text:p>
      <text:p text:style-name="P16"><text:tab/>A implementação revelou problemas que a leitura do código não deixava evidentes. A primeira versão da eleição em anel descartava candidatos de menor identificador em vez de substituí-los pelo próprio ID antes de repassar, o que travava a eleição sem que fosse óbvio olhando apenas a lógica isolada. Da mesma forma, a versão inicial do Token Ring manteve uma fila de pedidos local a cada nó, o que fazia apenas um nó conseguir entrar na seção crítica. Ambos os erros só ficaram <text:span text:style-name="T58">mais evidentes</text:span> observando os logs de execução real entre processos, reforçando a importância de testar em condições próximas às de produção.</text:p>
      <text:p text:style-name="P16"><text:tab/>A configuração com Docker <text:span text:style-name="T59">mostrou</text:span> a necessidade de copiar todos os módulos para a imagem (não só o arquivo principal), o comportamento de buffer de saída do Python em containers (<text:span text:style-name="Source_20_Text">PYTHONUNBUFFERED=1</text:span>) e a diferença entre parar um único container e derrubar o ambiente inteiro.</text:p>
      <text:p text:style-name="P16"><text:tab/>Os testes de falha (T2.2, T2.3, T3.3, T3.4) confirmaram uma limitação estrutural comum aos dois algoritmos: nenhum deles tolera a queda de um nó, pois dependem da integridade contínua do anel para funcionar. Com mais tempo, o próximo passo natural seria adicionar detecção de falhas via heartbeat/timeout, permitindo reconfiguração automática do anel e disparo de nova eleição sem intervenção manual, mas fora.</text:p>
      <text:p text:style-name="P55"><text:span text:style-name="T60">9</text:span>. <text:span text:style-name="T60">Referências</text:span></text:p>
      <text:list text:style-name="L2">
        <text:list-item>
          <text:p text:style-name="P56"><text:span text:style-name="T61">CHAKRABORTY, Anol. </text:span><text:span text:style-name="Strong_20_Emphasis"><text:span text:style-name="T61">Lamport-Clock-Simulator</text:span></text:span><text:span text:style-name="T61">. GitHub, 2023. Disponível em: </text:span><text:a xlink:type="simple" xlink:href="https://github.com/AnolChakraborty/Lamport-Clock-Simulator/blob/main/main.py" text:style-name="Internet_20_link" text:visited-style-name="Visited_20_Internet_20_Link"><text:span text:style-name="T61">https://github.com/AnolChakraborty/Lamport-Clock-Simulator/blob/main/main.py</text:span></text:a><text:span text:style-name="T61">.</text:span></text:p>
        </text:list-item>
        <text:list-item>
          <text:p text:style-name="P57"><text:span text:style-name="T61">BHATTACHARYA, Priyam. </text:span><text:span text:style-name="Strong_20_Emphasis"><text:span text:style-name="T61">java_token_based_DME_algorithm_ring_topology_MSc_AOS_Sem_2</text:span></text:span><text:span text:style-name="T61">. GitHub. Disponível em: </text:span><text:a xlink:type="simple" xlink:href="https://github.com/itspriyambhattacharya/java_token_based_DME_algorithm_ring_topology_MSc_AOS_Sem_2/blob/main/Process.java" text:style-name="Internet_20_link" text:visited-style-name="Visited_20_Internet_20_Link"><text:span text:style-name="T61">https://github.com/itspriyambhattacharya/java_token_based_DME_algorithm_ring_topology_MSc_AOS_Sem_2/blob/main/Process.java</text:span></text:a><text:span text:style-name="T61">. Acesso em: 5 jul. 2026.</text:span></text:p>
        </text:list-item>
        <text:list-item>
          <text:p text:style-name="P57"><text:span text:style-name="T61">PRAGO2001. </text:span><text:span text:style-name="Strong_20_Emphasis"><text:span text:style-name="T61">LP-1: DS/Ring_Bully/ring.py</text:span></text:span><text:span text:style-name="T61">. GitHub. Disponível em: </text:span><text:a xlink:type="simple" xlink:href="https://github.com/Prago2001/LP-1/blob/main/DS/Ring_Bully/ring.py" text:style-name="Internet_20_link" text:visited-style-name="Visited_20_Internet_20_Link"><text:span text:style-name="T61">https://github.com/Prago2001/LP-1/blob/main/DS/Ring_Bully/ring.py</text:span></text:a><text:span text:style-name="T61">.</text:span></text:p>
        </text:list-item>
        <text:list-item>
          <text:p text:style-name="P57"><text:span text:style-name="T61">GEEKSFORGEEKS. </text:span><text:span text:style-name="Strong_20_Emphasis"><text:span text:style-name="T61">Socket Programming with Multi-threading in Python</text:span></text:span><text:span text:style-name="T61">. Disponível em: </text:span><text:a xlink:type="simple" xlink:href="https://www.geeksforgeeks.org/python/socket-programming-multi-threading-python/" text:style-name="Internet_20_link" text:visited-style-name="Visited_20_Internet_20_Link"><text:span text:style-name="T61">https://www.geeksforgeeks.org/python/socket-programming-multi-threading-python/</text:span></text:a><text:span text:style-name="T61">.</text:span></text:p>
        </text:list-item>
        <text:list-item>
          <text:p text:style-name="P57"><text:span text:style-name="T61">HARRY. </text:span><text:span text:style-name="Strong_20_Emphasis"><text:span text:style-name="T61">Answer to "How to send JSON data over a socket in Python"</text:span></text:span><text:span text:style-name="T61">. Stack Overflow, 2020. Disponível em: </text:span><text:a xlink:type="simple" xlink:href="https://stackoverflow.com/a/61350221" text:style-name="Internet_20_link" text:visited-style-name="Visited_20_Internet_20_Link"><text:span text:style-name="T61">https://stackoverflow.com/a/61350221</text:span></text:a><text:span text:style-name="T61">.</text:span></text:p>
        </text:list-item>
        <text:list-item>
          <text:p text:style-name="P57"><text:span text:style-name="T61">JAVIER S. </text:span><text:span text:style-name="Strong_20_Emphasis"><text:span text:style-name="T61">Question: "Connect to a python socket inside a docker-compose mediated docker from host"</text:span></text:span><text:span text:style-name="T61">. Stack Overflow, 2021. Disponível em: </text:span><text:a xlink:type="simple" xlink:href="https://stackoverflow.com/q/69120262" text:style-name="Internet_20_link" text:visited-style-name="Visited_20_Internet_20_Link"><text:span text:style-name="T61">https://stackoverflow.com/q/69120262</text:span></text:a><text:span text:style-name="T61">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Verdana" style:font-size-asian="10pt" style:language-asian="zh" style:country-asian="CN" style:font-name-complex="Verdana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pt" fo:country="BR" style:letter-kerning="false" style:font-name-asian="Verdana" style:font-size-asian="10pt" style:language-asian="zh" style:country-asian="CN" style:font-name-complex="Verdana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Verdana" style:font-family-complex="Verdan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paragraph-properties fo:margin-top="0.423cm" fo:margin-bottom="0.212cm" style:contextual-spacing="false" fo:text-align="justify" style:justify-single-word="false"/>
      <style:text-properties fo:color="#2e74b5" loext:opacity="100%" style:font-name="Times New Roman" fo:font-family="'Times New Roman'" style:font-family-generic="roman" style:font-pitch="variable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-named</meta:initial-creator>
    <meta:editing-cycles>107</meta:editing-cycles>
    <meta:creation-date>2026-07-05T14:45:42.948000000</meta:creation-date>
    <dc:date>2026-07-05T23:13:58.046778339</dc:date>
    <meta:generator>LibreOffice/26.2.4.2$Linux_X86_64 LibreOffice_project/620$Build-2</meta:generator>
    <meta:editing-duration>PT5H22M59S</meta:editing-duration>
    <meta:print-date>2026-07-05T23:14:28.843461212</meta:print-date>
    <meta:printed-by>PDF files</meta:printed-by>
    <meta:document-statistic meta:table-count="1" meta:image-count="13" meta:object-count="0" meta:page-count="15" meta:paragraph-count="131" meta:word-count="2409" meta:character-count="15363" meta:non-whitespace-character-count="13045"/>
  </office:meta>
</office:document-meta>
</file>